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automatic-styles>
    <style:style style:name="P1" style:parent-style-name="PlainText" style:master-page-name="MP0" style:family="paragraph">
      <style:paragraph-properties fo:break-before="page"/>
      <style:text-properties style:font-name="Courier New" style:font-name-complex="Courier New"/>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P12" style:parent-style-name="PlainText" style:family="paragraph">
      <style:text-properties style:font-name="Courier New" style:font-name-complex="Courier New"/>
    </style:style>
    <style:style style:name="P13" style:parent-style-name="PlainText" style:family="paragraph">
      <style:text-properties style:font-name="Courier New" style:font-name-complex="Courier New"/>
    </style:style>
    <style:style style:name="P14" style:parent-style-name="PlainText" style:family="paragraph">
      <style:text-properties style:font-name="Courier New" style:font-name-complex="Courier New"/>
    </style:style>
    <style:style style:name="P15" style:parent-style-name="PlainText" style:family="paragraph">
      <style:text-properties style:font-name="Courier New" style:font-name-complex="Courier New"/>
    </style:style>
    <style:style style:name="P16" style:parent-style-name="PlainText" style:family="paragraph">
      <style:text-properties style:font-name="Courier New" style:font-name-complex="Courier New"/>
    </style:style>
    <style:style style:name="P17" style:parent-style-name="PlainText" style:family="paragraph">
      <style:text-properties style:font-name="Courier New" style:font-name-complex="Courier New"/>
    </style:style>
    <style:style style:name="P18" style:parent-style-name="PlainText" style:family="paragraph">
      <style:text-properties style:font-name="Courier New" style:font-name-complex="Courier New"/>
    </style:style>
    <style:style style:name="P19" style:parent-style-name="PlainText" style:family="paragraph">
      <style:text-properties style:font-name="Courier New" style:font-name-complex="Courier New"/>
    </style:style>
    <style:style style:name="P20" style:parent-style-name="PlainText" style:family="paragraph">
      <style:text-properties style:font-name="Courier New" style:font-name-complex="Courier New"/>
    </style:style>
    <style:style style:name="P21" style:parent-style-name="PlainText" style:family="paragraph">
      <style:text-properties style:font-name="Courier New" style:font-name-complex="Courier New"/>
    </style:style>
    <style:style style:name="P22" style:parent-style-name="PlainText" style:family="paragraph">
      <style:text-properties style:font-name="Courier New" style:font-name-complex="Courier New"/>
    </style:style>
    <style:style style:name="P23" style:parent-style-name="PlainText" style:family="paragraph">
      <style:text-properties style:font-name="Courier New" style:font-name-complex="Courier New"/>
    </style:style>
    <style:style style:name="P24" style:parent-style-name="PlainText" style:family="paragraph">
      <style:text-properties style:font-name="Courier New" style:font-name-complex="Courier New"/>
    </style:style>
    <style:style style:name="P25" style:parent-style-name="PlainText" style:family="paragraph">
      <style:text-properties style:font-name="Courier New" style:font-name-complex="Courier New"/>
    </style:style>
    <style:style style:name="P26" style:parent-style-name="PlainText" style:family="paragraph">
      <style:text-properties style:font-name="Courier New" style:font-name-complex="Courier New"/>
    </style:style>
    <style:style style:name="P27" style:parent-style-name="PlainText" style:family="paragraph">
      <style:text-properties style:font-name="Courier New" style:font-name-complex="Courier New"/>
    </style:style>
    <style:style style:name="P28" style:parent-style-name="PlainText" style:family="paragraph">
      <style:text-properties style:font-name="Courier New" style:font-name-complex="Courier New"/>
    </style:style>
    <style:style style:name="P29" style:parent-style-name="PlainText" style:family="paragraph">
      <style:text-properties style:font-name="Courier New" style:font-name-complex="Courier New"/>
    </style:style>
    <style:style style:name="P30" style:parent-style-name="PlainText" style:family="paragraph">
      <style:text-properties style:font-name="Courier New" style:font-name-complex="Courier New"/>
    </style:style>
    <style:style style:name="P31" style:parent-style-name="PlainText" style:family="paragraph">
      <style:text-properties style:font-name="Courier New" style:font-name-complex="Courier New"/>
    </style:style>
    <style:style style:name="P32" style:parent-style-name="PlainText" style:family="paragraph">
      <style:text-properties style:font-name="Courier New" style:font-name-complex="Courier New"/>
    </style:style>
    <style:style style:name="P33" style:parent-style-name="PlainText" style:family="paragraph">
      <style:text-properties style:font-name="Courier New" style:font-name-complex="Courier New"/>
    </style:style>
    <style:style style:name="P34" style:parent-style-name="PlainText" style:family="paragraph">
      <style:text-properties style:font-name="Courier New" style:font-name-complex="Courier New"/>
    </style:style>
    <style:style style:name="P35" style:parent-style-name="PlainText" style:family="paragraph">
      <style:text-properties style:font-name="Courier New" style:font-name-complex="Courier New"/>
    </style:style>
    <style:style style:name="P36" style:parent-style-name="PlainText" style:family="paragraph">
      <style:text-properties style:font-name="Courier New" style:font-name-complex="Courier New"/>
    </style:style>
    <style:style style:name="P37" style:parent-style-name="PlainText" style:family="paragraph">
      <style:text-properties style:font-name="Courier New" style:font-name-complex="Courier New"/>
    </style:style>
    <style:style style:name="P38" style:parent-style-name="PlainText" style:family="paragraph">
      <style:text-properties style:font-name="Courier New" style:font-name-complex="Courier New"/>
    </style:style>
    <style:style style:name="P39" style:parent-style-name="PlainText" style:family="paragraph">
      <style:text-properties style:font-name="Courier New" style:font-name-complex="Courier New"/>
    </style:style>
    <style:style style:name="P40" style:parent-style-name="PlainText" style:family="paragraph">
      <style:text-properties style:font-name="Courier New" style:font-name-complex="Courier New"/>
    </style:style>
    <style:style style:name="P41" style:parent-style-name="PlainText" style:family="paragraph">
      <style:text-properties style:font-name="Courier New" style:font-name-complex="Courier New"/>
    </style:style>
    <style:style style:name="P42" style:parent-style-name="PlainText" style:family="paragraph">
      <style:text-properties style:font-name="Courier New" style:font-name-complex="Courier New"/>
    </style:style>
    <style:style style:name="P43" style:parent-style-name="PlainText" style:family="paragraph">
      <style:text-properties style:font-name="Courier New" style:font-name-complex="Courier New"/>
    </style:style>
    <style:style style:name="P44" style:parent-style-name="PlainText" style:family="paragraph">
      <style:text-properties style:font-name="Courier New" style:font-name-complex="Courier New"/>
    </style:style>
    <style:style style:name="P45" style:parent-style-name="PlainText" style:family="paragraph">
      <style:text-properties style:font-name="Courier New" style:font-name-complex="Courier New"/>
    </style:style>
    <style:style style:name="P46" style:parent-style-name="PlainText" style:family="paragraph">
      <style:text-properties style:font-name="Courier New" style:font-name-complex="Courier New"/>
    </style:style>
    <style:style style:name="P47" style:parent-style-name="PlainText" style:family="paragraph">
      <style:text-properties style:font-name="Courier New" style:font-name-complex="Courier New"/>
    </style:style>
    <style:style style:name="P48" style:parent-style-name="PlainText" style:family="paragraph">
      <style:text-properties style:font-name="Courier New" style:font-name-complex="Courier New"/>
    </style:style>
    <style:style style:name="P49" style:parent-style-name="PlainText" style:family="paragraph">
      <style:text-properties style:font-name="Courier New" style:font-name-complex="Courier New"/>
    </style:style>
    <style:style style:name="P50" style:parent-style-name="PlainText" style:family="paragraph">
      <style:text-properties style:font-name="Courier New" style:font-name-complex="Courier New"/>
    </style:style>
    <style:style style:name="P51" style:parent-style-name="PlainText" style:family="paragraph">
      <style:text-properties style:font-name="Courier New" style:font-name-complex="Courier New"/>
    </style:style>
    <style:style style:name="P52" style:parent-style-name="PlainText" style:family="paragraph">
      <style:text-properties style:font-name="Courier New" style:font-name-complex="Courier New"/>
    </style:style>
    <style:style style:name="P53" style:parent-style-name="PlainText" style:family="paragraph">
      <style:text-properties style:font-name="Courier New" style:font-name-complex="Courier New"/>
    </style:style>
    <style:style style:name="P54" style:parent-style-name="PlainText" style:family="paragraph">
      <style:text-properties style:font-name="Courier New" style:font-name-complex="Courier New"/>
    </style:style>
    <style:style style:name="P55" style:parent-style-name="PlainText" style:family="paragraph">
      <style:text-properties style:font-name="Courier New" style:font-name-complex="Courier New"/>
    </style:style>
    <style:style style:name="P56" style:parent-style-name="PlainText" style:family="paragraph">
      <style:text-properties style:font-name="Courier New" style:font-name-complex="Courier New"/>
    </style:style>
    <style:style style:name="P57" style:parent-style-name="PlainText" style:family="paragraph">
      <style:text-properties style:font-name="Courier New" style:font-name-complex="Courier New"/>
    </style:style>
    <style:style style:name="P58" style:parent-style-name="PlainText" style:family="paragraph">
      <style:text-properties style:font-name="Courier New" style:font-name-complex="Courier New"/>
    </style:style>
    <style:style style:name="P59" style:parent-style-name="PlainText" style:family="paragraph">
      <style:text-properties style:font-name="Courier New" style:font-name-complex="Courier New"/>
    </style:style>
    <style:style style:name="P60" style:parent-style-name="PlainText" style:family="paragraph">
      <style:text-properties style:font-name="Courier New" style:font-name-complex="Courier New"/>
    </style:style>
    <style:style style:name="P61" style:parent-style-name="PlainText" style:family="paragraph">
      <style:text-properties style:font-name="Courier New" style:font-name-complex="Courier New"/>
    </style:style>
    <style:style style:name="P62" style:parent-style-name="PlainText" style:family="paragraph">
      <style:text-properties style:font-name="Courier New" style:font-name-complex="Courier New"/>
    </style:style>
    <style:style style:name="P63" style:parent-style-name="PlainText" style:family="paragraph">
      <style:text-properties style:font-name="Courier New" style:font-name-complex="Courier New"/>
    </style:style>
    <style:style style:name="P64" style:parent-style-name="PlainText" style:family="paragraph">
      <style:text-properties style:font-name="Courier New" style:font-name-complex="Courier New"/>
    </style:style>
    <style:style style:name="P65" style:parent-style-name="PlainText" style:family="paragraph">
      <style:text-properties style:font-name="Courier New" style:font-name-complex="Courier New"/>
    </style:style>
    <style:style style:name="P66" style:parent-style-name="PlainText" style:family="paragraph">
      <style:text-properties style:font-name="Courier New" style:font-name-complex="Courier New"/>
    </style:style>
    <style:style style:name="P67" style:parent-style-name="PlainText" style:family="paragraph">
      <style:text-properties style:font-name="Courier New" style:font-name-complex="Courier New"/>
    </style:style>
    <style:style style:name="P68" style:parent-style-name="PlainText" style:family="paragraph">
      <style:text-properties style:font-name="Courier New" style:font-name-complex="Courier New"/>
    </style:style>
    <style:style style:name="P69" style:parent-style-name="PlainText" style:family="paragraph">
      <style:text-properties style:font-name="Courier New" style:font-name-complex="Courier New"/>
    </style:style>
    <style:style style:name="P70" style:parent-style-name="PlainText" style:family="paragraph">
      <style:text-properties style:font-name="Courier New" style:font-name-complex="Courier New"/>
    </style:style>
    <style:style style:name="P71" style:parent-style-name="PlainText" style:family="paragraph">
      <style:text-properties style:font-name="Courier New" style:font-name-complex="Courier New"/>
    </style:style>
    <style:style style:name="P72" style:parent-style-name="PlainText" style:family="paragraph">
      <style:text-properties style:font-name="Courier New" style:font-name-complex="Courier New"/>
    </style:style>
    <style:style style:name="P73" style:parent-style-name="PlainText" style:family="paragraph">
      <style:text-properties style:font-name="Courier New" style:font-name-complex="Courier New"/>
    </style:style>
    <style:style style:name="P74" style:parent-style-name="PlainText" style:family="paragraph">
      <style:text-properties style:font-name="Courier New" style:font-name-complex="Courier New"/>
    </style:style>
    <style:style style:name="P75" style:parent-style-name="PlainText" style:family="paragraph">
      <style:text-properties style:font-name="Courier New" style:font-name-complex="Courier New"/>
    </style:style>
    <style:style style:name="P76" style:parent-style-name="PlainText" style:family="paragraph">
      <style:text-properties style:font-name="Courier New" style:font-name-complex="Courier New"/>
    </style:style>
    <style:style style:name="P77" style:parent-style-name="PlainText" style:family="paragraph">
      <style:text-properties style:font-name="Courier New" style:font-name-complex="Courier New"/>
    </style:style>
    <style:style style:name="P78" style:parent-style-name="PlainText" style:family="paragraph">
      <style:text-properties style:font-name="Courier New" style:font-name-complex="Courier New"/>
    </style:style>
    <style:style style:name="P79" style:parent-style-name="PlainText" style:family="paragraph">
      <style:text-properties style:font-name="Courier New" style:font-name-complex="Courier New"/>
    </style:style>
    <style:style style:name="P80" style:parent-style-name="PlainText" style:family="paragraph">
      <style:text-properties style:font-name="Courier New" style:font-name-complex="Courier New"/>
    </style:style>
    <style:style style:name="T81" style:parent-style-name="DefaultParagraphFont" style:family="text">
      <style:text-properties style:font-name="Courier New" style:font-name-complex="Courier New"/>
    </style:style>
  </office:automatic-styles>
  <office:body>
    <office:text text:use-soft-page-breaks="true">
      <text:p text:style-name="P1">Skip to content</text:p>
      <text:p text:style-name="P2"/>
      <text:p text:style-name="P3"/>
      <text:p text:style-name="P4"/>
      <text:p text:style-name="P5">Download</text:p>
      <text:p text:style-name="P6">Loyalty Program Rules</text:p>
      <text:p text:style-name="P7">MoneyTime – Play &amp; Earn – Loyalty Program Rules</text:p>
      <text:p text:style-name="P8">1. Overview</text:p>
      <text:p text:style-name="P9">The MoneyTime Loyalty Program (“Program”) is designed to reward users for their engagement with our app and games. By playing eligible games, users accumulate loyalty coins called Monies (“Monies”), which may be converted into users’ local currency, subject to the terms outlined below.</text:p>
      <text:p text:style-name="P10"/>
      <text:p text:style-name="P11">2. Eligibility</text:p>
      <text:p text:style-name="P12">The Program is open to individuals who:</text:p>
      <text:p text:style-name="P13"/>
      <text:p text:style-name="P14">Are at least 18 years old (or the age of majority in their jurisdiction).</text:p>
      <text:p text:style-name="P15">Have a moneytime User ID in good standing.</text:p>
      <text:p text:style-name="P16">Comply with all MoneyTime terms of service and program policies.</text:p>
      <text:p text:style-name="P17">Play genuinely and without any fraud and only  with 1 account.</text:p>
      <text:p text:style-name="P18">3. Earning Monies</text:p>
      <text:p text:style-name="P19">Users could earn Monies through various activities, including but not limited to:</text:p>
      <text:p text:style-name="P20"/>
      <text:p text:style-name="P21">Playing eligible games on the MoneyTime platform.</text:p>
      <text:p text:style-name="P22">Achieving in-game milestones and objectives or daily streak.</text:p>
      <text:p text:style-name="P23">Complete tasks via our partners’ offerwall..</text:p>
      <text:p text:style-name="P24">Participating in special events, challenges, or promotions.</text:p>
      <text:p text:style-name="P25">Moneytime will never ask you to pay to be eligible for the Program. You just need to play. </text:p>
      <text:p text:style-name="P26"/>
      <text:p text:style-name="P27">4. Conversion of Monies</text:p>
      <text:p text:style-name="P28">Every 3 hours Monies available in the user’s account are converted into real currency based on a dynamic exchange rate influenced notably (but not limited to) by :</text:p>
      <text:p text:style-name="P29"/>
      <text:p text:style-name="P30">User-generated ad revenue: The revenue generated through in-game ads viewed by the user.</text:p>
      <text:p text:style-name="P31">Fraud prevention assessment: Users are subject to a proprietary fraud scoring system to prevent misuse of the Program.</text:p>
      <text:p text:style-name="P32">Game engagement metrics: Including time spent playing and achievements unlocked.</text:p>
      <text:p text:style-name="P33">MoneyTime reserves the right to adjust exchange rates at its discretion to ensure the sustainability of the Program.</text:p>
      <text:p text:style-name="P34"/>
      <text:p text:style-name="P35">Only the amount of local currency indicated at the time of a payout is the amount available to the user. If the user is not using Moneytime Application for 6 months, and/or if he does not initiate any payout for 6 months, his Monies and his cash converted from Monies shall be cancelled. In case of difficulty, please contact us at contact@moneytime.dev </text:p>
      <text:p text:style-name="P36"/>
      <text:p text:style-name="P37">5. Redemption &amp; Payouts</text:p>
      <text:p text:style-name="P38">Users may request to redeem their Monies converted into his local currency for cash or other rewards proposed by Moneytime once they reach the minimum withdrawal threshold.</text:p>
      <text:p text:style-name="P39">Payouts will be made in the user’s local currency via supported payment methods.</text:p>
      <text:p text:style-name="P40">Processing times for payouts may vary and are subject to verification and fraud detection procedures.</text:p>
      <text:p text:style-name="P41">MoneyTime reserves the right to deny, delay, or revoke withdrawals in cases of suspected fraudulent activity, misuse, or violation of Program terms.</text:p>
      <text:p text:style-name="P42">The user’s account is capped at a maximum of USD 100, or the equivalent in the user’s local currency. Once this cap is reached, the user shall withdraw their rewards before they can convert Monies into cash again.</text:p>
      <text:p text:style-name="P43">6. Fraud Prevention &amp; Fair Use Policy</text:p>
      <text:p text:style-name="P44">To maintain a fair and transparent ecosystem, users agree to:</text:p>
      <text:p text:style-name="P45"/>
      <text:p text:style-name="P46">Refrain from any fraudulent activity, such as bot usage, automated gameplay, or manipulation of engagement metrics.</text:p>
      <text:p text:style-name="P47">Adhere to ethical gameplay and avoid exploiting system loopholes.</text:p>
      <text:p text:style-name="P48">Undergo account verification if required for security or compliance purposes.</text:p>
      <text:p text:style-name="P49">Undergo identity verification via our partner Facetech. By using Moneytime application and the Program you agree to Facetech’s terms that you find there : https://dev.facetec.com/terms and there : https://dev.facetec.com/privacy-site  </text:p>
      <text:p text:style-name="P50">Violations of these policies may result in suspension or termination of the user’s account, forfeiture of Monies, and potential legal action.</text:p>
      <text:p text:style-name="P51"/>
      <text:p text:style-name="P52">7. Program Modifications &amp; Termination</text:p>
      <text:p text:style-name="P53">MoneyTime reserves the right to modify, suspend, or terminate the Program at any time, with or without prior notice.</text:p>
      <text:p text:style-name="P54">Any changes will be published on Moneytime’s website:  https://www.moneytime.dev/loyalty-program-rules </text:p>
      <text:p text:style-name="P55">Continued participation in the Program following any updates constitutes acceptance of the revised terms.</text:p>
      <text:p text:style-name="P56">8. Compliance Considerations</text:p>
      <text:p text:style-name="P57">MoneyTime makes no guarantees regarding the availability of rewards, payout amounts, or conversion rates.</text:p>
      <text:p text:style-name="P58">Users are responsible for any taxes or legal obligations arising from participation in the Program.</text:p>
      <text:p text:style-name="P59">9. Contact &amp; Support</text:p>
      <text:p text:style-name="P60">For any questions regarding the Program, users may contact contact@moneytime.dev .</text:p>
      <text:p text:style-name="P61"/>
      <text:p text:style-name="P62"/>
      <text:p text:style-name="P63">Money time – All rights reserved</text:p>
      <text:p text:style-name="P64"/>
      <text:p text:style-name="P65">See our 24k + positives reviews on Google Play</text:p>
      <text:p text:style-name="P66"/>
      <text:p text:style-name="P67"/>
      <text:p text:style-name="P68"/>
      <text:p text:style-name="P69"/>
      <text:p text:style-name="P70"/>
      <text:p text:style-name="P71"/>
      <text:p text:style-name="P72">ABOUT US</text:p>
      <text:p text:style-name="P73">Moneytime combines fun gaming with real cash rewards. Our mission is simple: make entertainment profitable. We deliver fair games, instant payouts and a secure experience. Join thousands of players already earning every day. Download now and start turning playtime into payday.</text:p>
      <text:p text:style-name="P74"/>
      <text:p text:style-name="P75">CHANGE LANGUAGE</text:p>
      <text:p text:style-name="P76">Français</text:p>
      <text:p text:style-name="P77">HELP</text:p>
      <text:p text:style-name="P78">Privacy Policy</text:p>
      <text:p text:style-name="P79">Terms of Services</text:p>
      <text:p text:style-name="P80">Loyalty Program Rules</text:p>
      <text:p text:style-name="PlainText"><text:span text:style-name="T81">Copyright © 2025 Money Time – Designed by Loïc Lacourt – Developped by Manuel Milha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
    <dc:creator>Trent Tiebout</dc:creator>
    <meta:creation-date>2026-05-09T15:45:00Z</meta:creation-date>
    <dc:date>2026-05-09T15:45:00Z</dc:date>
    <meta:template xlink:href="Normal.dotm" xlink:type="simple"/>
    <meta:editing-cycles>2</meta:editing-cycles>
    <meta:editing-duration>PT120S</meta:editing-duration>
    <meta:document-statistic meta:page-count="1" meta:paragraph-count="9" meta:word-count="715" meta:character-count="4787" meta:row-count="34" meta:non-whitespace-character-count="4081"/>
  </office:meta>
</office:document-meta>
</file>